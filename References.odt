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language="fr" fo:country="FR"/>
    </style:style>
    <style:style style:name="T6" style:parent-style-name="DefaultParagraphFont" style:family="text">
      <style:text-properties fo:font-style="italic" style:font-style-asian="italic" style:font-style-complex="italic" fo:language="fr" fo:country="FR"/>
    </style:style>
    <style:style style:name="T7" style:parent-style-name="DefaultParagraphFont" style:family="text">
      <style:text-properties fo:language="fr" fo:country="FR"/>
    </style:style>
    <style:style style:name="T8" style:parent-style-name="Hyperlink" style:family="text">
      <style:text-properties fo:language="fr" fo:country="FR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References</text:span></text:p>
      <text:p text:style-name="Normal">JUnit Team. (2024).<text:s/><text:span text:style-name="T3">JUnit 5 User Guide</text:span>.<text:s/><text:a xlink:href="https://junit.org/junit5/docs/current/user-guide/" office:target-frame-name="_top" xlink:show="replace"><text:span text:style-name="Hyperlink">https://junit.org/junit5/docs/current/user-guide/</text:span></text:a></text:p>
      <text:p text:style-name="Normal">Eclipse Foundation. (2024).<text:s/><text:span text:style-name="T4">Eclipse IDE Documentation</text:span>.<text:s/><text:a xlink:href="https://www.eclipse.org/documentation/" office:target-frame-name="_top" xlink:show="replace"><text:span text:style-name="Hyperlink">https://www.eclipse.org/documentation/</text:span></text:a></text:p>
      <text:p text:style-name="Normal"><text:span text:style-name="T5">Oracle. (2024).<text:s/></text:span><text:span text:style-name="T6">Java SE 24 Documentation</text:span><text:span text:style-name="T7">.<text:s/></text:span><text:a xlink:href="https://docs.oracle.com/en/java/" office:target-frame-name="_top" xlink:show="replace"><text:span text:style-name="T8">https://docs.oracle.com/en/java/</text:span></text:a></text:p>
      <text:p text:style-name="Normal">Oracle. (2024).<text:s/><text:span text:style-name="T9">JavaFX CSS Reference Guide</text:span><text:s/><text:a xlink:href="https://openjfx.io/javadoc/22/javafx.graphics/javafx/scene/doc-files/cssref.html" office:target-frame-name="_top" xlink:show="replace"><text:span text:style-name="Hyperlink">https://openjfx.io/javadoc/22/javafx.graphics/javafx/scene/doc-files/cssref.html</text:span></text:a></text:p>
      <text:p text:style-name="Normal">SQLite Consortium. (2024).<text:s/><text:span text:style-name="T10">SQLite Documentation</text:span>.<text:s/><text:a xlink:href="https://www.sqlite.org/docs.html" office:target-frame-name="_top" xlink:show="replace"><text:span text:style-name="Hyperlink">https://www.sqlite.org/docs.html</text:span></text:a></text:p>
      <text:p text:style-name="Normal">Geeks for Geeks<text:s/><text:a xlink:href="https://www.geeksforgeeks.org/advance-java/how-to-assert-log-messages-with-junit-in-java/" office:target-frame-name="_top" xlink:show="replace"><text:span text:style-name="Hyperlink">https://www.geeksforgeeks.org/advance-java/how-to-assert-log-messages-with-junit-in-java/</text:span></text:a></text:p>
      <text:p text:style-name="Normal">https://www.geeksforgeeks.org/advance-java/writing-templates-for-test-cases-using-junit-5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 Schaefer</meta:initial-creator>
    <dc:creator>Sam Schaefer</dc:creator>
    <meta:creation-date>2026-05-04T21:41:00Z</meta:creation-date>
    <dc:date>2026-05-04T21:42:00Z</dc:date>
    <meta:template xlink:href="Normal" xlink:type="simple"/>
    <meta:editing-cycles>1</meta:editing-cycles>
    <meta:editing-duration>PT60S</meta:editing-duration>
    <meta:document-statistic meta:page-count="1" meta:paragraph-count="2" meta:word-count="162" meta:character-count="1086" meta:row-count="7" meta:non-whitespace-character-count="926"/>
  </office:meta>
</office:document-meta>
</file>